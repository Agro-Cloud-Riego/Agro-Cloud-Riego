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6" style:family="table-cell" style:parent-style-name="Default" style:data-style-name="N19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7.112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3.3655cm"/>
    </style:style>
    <style:style style:name="co5" style:family="table-column">
      <style:table-column-properties fo:break-before="auto" style:column-width="3.111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661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4.67783333333333cm"/>
    </style:style>
    <style:style style:name="co10" style:family="table-column">
      <style:table-column-properties fo:break-before="auto" style:column-width="2.56116666666667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5.99016666666667cm"/>
    </style:style>
    <style:style style:name="co14" style:family="table-column">
      <style:table-column-properties fo:break-before="auto" style:column-width="2.4765cm"/>
    </style:style>
    <style:style style:name="co15" style:family="table-column">
      <style:table-column-properties fo:break-before="auto" style:column-width="4.254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" style:family="table-cell">
      <style:map style:condition="of:is-true-formula([.$F2]&lt;=[.$G2])" style:apply-style-name="cf3" style:base-cell-address="Inventario.G2"/>
      <style:map style:condition="of:is-true-formula([.$F2]&lt;=[.$G2])" style:apply-style-name="cf1" style:base-cell-address="Inventario.G2"/>
      <style:map style:condition="of:is-true-formula([.$F2]&lt;=[.$G2])" style:apply-style-name="cf2" style:base-cell-address="Inventario.G2"/>
    </style:style>
    <style:style style:name="ce9" style:family="table-cell">
      <style:map style:condition="of:is-true-formula(NOT(ISERROR(SEARCH(&quot;STOCK OK&quot;;[.G2]))))" style:apply-style-name="cf4" style:base-cell-address="Inventario.G2"/>
      <style:map style:condition="of:is-true-formula([.$F2]&lt;=[.$G2])" style:apply-style-name="cf3" style:base-cell-address="Inventario.G2"/>
      <style:map style:condition="of:is-true-formula([.$F2]&lt;=[.$G2])" style:apply-style-name="cf1" style:base-cell-address="Inventario.G2"/>
      <style:map style:condition="of:is-true-formula([.$F2]&lt;=[.$G2])" style:apply-style-name="cf2" style:base-cell-address="Inventario.G2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entario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Categoría</text:p>
          </table:table-cell>
          <table:table-cell office:value-type="string" table:style-name="ce3">
            <text:p>Descripsion /Modelo</text:p>
          </table:table-cell>
          <table:table-cell office:value-type="string" table:style-name="ce2">
            <text:p>Stock Inicial</text:p>
          </table:table-cell>
          <table:table-cell office:value-type="string" table:style-name="ce2">
            <text:p>Entradas Totales</text:p>
          </table:table-cell>
          <table:table-cell office:value-type="string" table:style-name="ce2">
            <text:p>Salidas Totales</text:p>
          </table:table-cell>
          <table:table-cell office:value-type="string" table:style-name="ce2">
            <text:p>Stock Actual</text:p>
          </table:table-cell>
          <table:table-cell office:value-type="string" table:style-name="ce2">
            <text:p>Stock Crítico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ontactor de Torre <text:s/>D25</text:p>
          </table:table-cell>
          <table:table-cell office:value-type="float" office:value="35" table:style-name="ce1">
            <text:p>35</text:p>
          </table:table-cell>
          <table:table-cell office:value-type="float" office:value="0" table:formula="of:=SUMIF([Entradas.B:.B]; [.B2]; [Entradas.C:.C])" table:style-name="ce1">
            <text:p>0</text:p>
          </table:table-cell>
          <table:table-cell office:value-type="float" office:value="2" table:formula="of:=SUMIF([Salidas.B:.B]; [.B2]; [Salidas.C:.C])" table:style-name="ce1">
            <text:p>2</text:p>
          </table:table-cell>
          <table:table-cell office:value-type="float" office:value="33" table:formula="of:=[.C2]+[.D2]-[.E2]" table:style-name="ce1">
            <text:p>33</text:p>
          </table:table-cell>
          <table:table-cell office:value-type="string" office:string-value="STOCK OK" table:formula="of:=IF([Inventario.$F2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ontactor de Panel <text:s/>D40A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SUMIF([Entradas.B:.B]; [.B3]; [Entradas.C:.C])" table:style-name="ce1">
            <text:p>0</text:p>
          </table:table-cell>
          <table:table-cell office:value-type="float" office:value="0" table:formula="of:=SUMIF([Salidas.B:.B]; [.B3]; [Salidas.C:.C])" table:style-name="ce1">
            <text:p>0</text:p>
          </table:table-cell>
          <table:table-cell office:value-type="float" office:value="7" table:formula="of:=[.C3]+[.D3]-[.E3]" table:style-name="ce1">
            <text:p>7</text:p>
          </table:table-cell>
          <table:table-cell office:value-type="string" office:string-value=" PEDIR URGENTE" table:formula="of:=IF([Inventario.$F3]&lt;8;&quot; PEDIR URGENTE&quot;;&quot;STOCK OK&quot;)" table:style-name="ce9">
            <text:p><text:s/>PEDIR URGEN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ontactor de Panel <text:s/>D3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IF([Entradas.B:.B]; [.B4]; [Entradas.C:.C])" table:style-name="ce1">
            <text:p>0</text:p>
          </table:table-cell>
          <table:table-cell office:value-type="float" office:value="0" table:formula="of:=SUMIF([Salidas.B:.B]; [.B4]; [Salidas.C:.C])" table:style-name="ce1">
            <text:p>0</text:p>
          </table:table-cell>
          <table:table-cell office:value-type="float" office:value="3" table:formula="of:=[.C4]+[.D4]-[.E4]" table:style-name="ce1">
            <text:p>3</text:p>
          </table:table-cell>
          <table:table-cell office:value-type="string" office:string-value=" PEDIR URGENTE" table:formula="of:=IF([Inventario.$F4]&lt;8;&quot; PEDIR URGENTE&quot;;&quot;STOCK OK&quot;)" table:style-name="ce9">
            <text:p><text:s/>PEDIR URGENTE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ontactor de Panel <text:s/>FLA 40</text:p>
          </table:table-cell>
          <table:table-cell office:value-type="float" office:value="13" table:style-name="ce1">
            <text:p>13</text:p>
          </table:table-cell>
          <table:table-cell office:value-type="float" office:value="0" table:formula="of:=SUMIF([Entradas.B:.B]; [.B5]; [Entradas.C:.C])" table:style-name="ce1">
            <text:p>0</text:p>
          </table:table-cell>
          <table:table-cell office:value-type="float" office:value="1" table:formula="of:=SUMIF([Salidas.B:.B]; [.B5]; [Salidas.C:.C])" table:style-name="ce1">
            <text:p>1</text:p>
          </table:table-cell>
          <table:table-cell office:value-type="float" office:value="12" table:formula="of:=[.C5]+[.D5]-[.E5]" table:style-name="ce1">
            <text:p>12</text:p>
          </table:table-cell>
          <table:table-cell office:value-type="string" office:string-value="STOCK OK" table:formula="of:=IF([Inventario.$F5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ontactor Guarda Fase FLA 40</text:p>
          </table:table-cell>
          <table:table-cell office:value-type="float" office:value="13" table:style-name="ce1">
            <text:p>13</text:p>
          </table:table-cell>
          <table:table-cell office:value-type="float" office:value="0" table:formula="of:=SUMIF([Entradas.B:.B]; [.B6]; [Entradas.C:.C])" table:style-name="ce1">
            <text:p>0</text:p>
          </table:table-cell>
          <table:table-cell office:value-type="float" office:value="0" table:formula="of:=SUMIF([Salidas.B:.B]; [.B6]; [Salidas.C:.C])" table:style-name="ce1">
            <text:p>0</text:p>
          </table:table-cell>
          <table:table-cell office:value-type="float" office:value="13" table:formula="of:=[.C6]+[.D6]-[.E6]" table:style-name="ce1">
            <text:p>13</text:p>
          </table:table-cell>
          <table:table-cell office:value-type="string" office:string-value="STOCK OK" table:formula="of:=IF([Inventario.$F6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Fusible Panel FLA 45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IF([Entradas.B:.B]; [.B7]; [Entradas.C:.C])" table:style-name="ce1">
            <text:p>0</text:p>
          </table:table-cell>
          <table:table-cell office:value-type="float" office:value="0" table:formula="of:=SUMIF([Salidas.B:.B]; [.B7]; [Salidas.C:.C])" table:style-name="ce1">
            <text:p>0</text:p>
          </table:table-cell>
          <table:table-cell office:value-type="float" office:value="9" table:formula="of:=[.C7]+[.D7]-[.E7]" table:style-name="ce1">
            <text:p>9</text:p>
          </table:table-cell>
          <table:table-cell office:value-type="string" office:string-value="STOCK OK" table:formula="of:=IF([Inventario.$F7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Fusible Panel FRS-25R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8]; [Entradas.C:.C])" table:style-name="ce1">
            <text:p>0</text:p>
          </table:table-cell>
          <table:table-cell office:value-type="float" office:value="0" table:formula="of:=SUMIF([Salidas.B:.B]; [.B8]; [Salidas.C:.C])" table:style-name="ce1">
            <text:p>0</text:p>
          </table:table-cell>
          <table:table-cell office:value-type="float" office:value="1" table:formula="of:=[.C8]+[.D8]-[.E8]" table:style-name="ce1">
            <text:p>1</text:p>
          </table:table-cell>
          <table:table-cell office:value-type="string" office:string-value=" PEDIR URGENTE" table:formula="of:=IF([Inventario.$F8]&lt;8;&quot; PEDIR URGENTE&quot;;&quot;STOCK OK&quot;)" table:style-name="ce9">
            <text:p><text:s/>PEDIR URGEN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Microswitch valley (pata corta)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IF([Entradas.B:.B]; [.B9]; [Entradas.C:.C])" table:style-name="ce1">
            <text:p>0</text:p>
          </table:table-cell>
          <table:table-cell office:value-type="float" office:value="0" table:formula="of:=SUMIF([Salidas.B:.B]; [.B9]; [Salidas.C:.C])" table:style-name="ce1">
            <text:p>0</text:p>
          </table:table-cell>
          <table:table-cell office:value-type="float" office:value="21" table:formula="of:=[.C9]+[.D9]-[.E9]" table:style-name="ce1">
            <text:p>21</text:p>
          </table:table-cell>
          <table:table-cell office:value-type="string" office:string-value="STOCK OK" table:formula="of:=IF([Inventario.$F9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Micro Lindsay (pata larga)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IF([Entradas.B:.B]; [.B10]; [Entradas.C:.C])" table:style-name="ce1">
            <text:p>0</text:p>
          </table:table-cell>
          <table:table-cell office:value-type="float" office:value="5" table:formula="of:=SUMIF([Salidas.B:.B]; [.B10]; [Salidas.C:.C])" table:style-name="ce1">
            <text:p>5</text:p>
          </table:table-cell>
          <table:table-cell office:value-type="float" office:value="14" table:formula="of:=[.C10]+[.D10]-[.E10]" table:style-name="ce1">
            <text:p>14</text:p>
          </table:table-cell>
          <table:table-cell office:value-type="string" office:string-value="STOCK OK" table:formula="of:=IF([Inventario.$F10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Brazo de Leva Pastico (Lindsay)</text:p>
          </table:table-cell>
          <table:table-cell office:value-type="float" office:value="27" table:style-name="ce1">
            <text:p>27</text:p>
          </table:table-cell>
          <table:table-cell office:value-type="float" office:value="0" table:formula="of:=SUMIF([Entradas.B:.B]; [.B11]; [Entradas.C:.C])" table:style-name="ce1">
            <text:p>0</text:p>
          </table:table-cell>
          <table:table-cell office:value-type="float" office:value="0" table:formula="of:=SUMIF([Salidas.B:.B]; [.B11]; [Salidas.C:.C])" table:style-name="ce1">
            <text:p>0</text:p>
          </table:table-cell>
          <table:table-cell office:value-type="float" office:value="27" table:formula="of:=[.C11]+[.D11]-[.E11]" table:style-name="ce1">
            <text:p>27</text:p>
          </table:table-cell>
          <table:table-cell office:value-type="string" office:string-value="STOCK OK" table:formula="of:=IF([Inventario.$F11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Leva Plastico (Lindsay)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IF([Entradas.B:.B]; [.B12]; [Entradas.C:.C])" table:style-name="ce1">
            <text:p>0</text:p>
          </table:table-cell>
          <table:table-cell office:value-type="float" office:value="0" table:formula="of:=SUMIF([Salidas.B:.B]; [.B12]; [Salidas.C:.C])" table:style-name="ce1">
            <text:p>0</text:p>
          </table:table-cell>
          <table:table-cell office:value-type="float" office:value="21" table:formula="of:=[.C12]+[.D12]-[.E12]" table:style-name="ce1">
            <text:p>21</text:p>
          </table:table-cell>
          <table:table-cell office:value-type="string" office:string-value="STOCK OK" table:formula="of:=IF([Inventario.$F12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Resorte Para Caja de Alineación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IF([Entradas.B:.B]; [.B13]; [Entradas.C:.C])" table:style-name="ce1">
            <text:p>0</text:p>
          </table:table-cell>
          <table:table-cell office:value-type="float" office:value="0" table:formula="of:=SUMIF([Salidas.B:.B]; [.B13]; [Salidas.C:.C])" table:style-name="ce1">
            <text:p>0</text:p>
          </table:table-cell>
          <table:table-cell office:value-type="float" office:value="15" table:formula="of:=[.C13]+[.D13]-[.E13]" table:style-name="ce1">
            <text:p>15</text:p>
          </table:table-cell>
          <table:table-cell office:value-type="string" office:string-value="STOCK OK" table:formula="of:=IF([Inventario.$F13]&lt;8;&quot; PEDIR URGENTE&quot;;&quot;STOCK OK&quot;)" table:style-name="ce9">
            <text:p>STOCK 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Térmica Tri-polar C32 400 volt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IF([Entradas.B:.B]; [.B14]; [Entradas.C:.C])" table:style-name="ce1">
            <text:p>0</text:p>
          </table:table-cell>
          <table:table-cell office:value-type="float" office:value="0" table:formula="of:=SUMIF([Salidas.B:.B]; [.B14]; [Salidas.C:.C])" table:style-name="ce1">
            <text:p>0</text:p>
          </table:table-cell>
          <table:table-cell office:value-type="float" office:value="4" table:formula="of:=[.C14]+[.D14]-[.E14]" table:style-name="ce1">
            <text:p>4</text:p>
          </table:table-cell>
          <table:table-cell office:value-type="string" office:string-value=" PEDIR URGENTE" table:formula="of:=IF([Inventario.$F14]&lt;8;&quot; PEDIR URGENTE&quot;;&quot;STOCK OK&quot;)" table:style-name="ce9">
            <text:p><text:s/>PEDIR URGEN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Térmica Uni-polar C32 400 volt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IF([Entradas.B:.B]; [.B15]; [Entradas.C:.C])" table:style-name="ce1">
            <text:p>0</text:p>
          </table:table-cell>
          <table:table-cell office:value-type="float" office:value="2" table:formula="of:=SUMIF([Salidas.B:.B]; [.B15]; [Salidas.C:.C])" table:style-name="ce1">
            <text:p>2</text:p>
          </table:table-cell>
          <table:table-cell office:value-type="float" office:value="2" table:formula="of:=[.C15]+[.D15]-[.E15]" table:style-name="ce1">
            <text:p>2</text:p>
          </table:table-cell>
          <table:table-cell office:value-type="string" office:string-value=" PEDIR URGENTE" table:formula="of:=IF([Inventario.$F15]&lt;8;&quot; PEDIR URGENTE&quot;;&quot;STOCK OK&quot;)" table:style-name="ce9">
            <text:p><text:s/>PEDIR URGEN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Relay Retraso de un Seundo 120 v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IF([Entradas.B:.B]; [.B16]; [Entradas.C:.C])" table:style-name="ce1">
            <text:p>0</text:p>
          </table:table-cell>
          <table:table-cell office:value-type="float" office:value="0" table:formula="of:=SUMIF([Salidas.B:.B]; [.B16]; [Salidas.C:.C])" table:style-name="ce1">
            <text:p>0</text:p>
          </table:table-cell>
          <table:table-cell office:value-type="float" office:value="3" table:formula="of:=[.C16]+[.D16]-[.E16]" table:style-name="ce1">
            <text:p>3</text:p>
          </table:table-cell>
          <table:table-cell office:value-type="string" office:string-value=" PEDIR URGENTE" table:formula="of:=IF([Inventario.$F16]&lt;8;&quot; PEDIR URGENTE&quot;;&quot;STOCK OK&quot;)" table:style-name="ce9">
            <text:p><text:s/>PEDIR URGEN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Bornera 12 Salida Valley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17]; [Entradas.C:.C])" table:style-name="ce1">
            <text:p>0</text:p>
          </table:table-cell>
          <table:table-cell office:value-type="float" office:value="0" table:formula="of:=SUMIF([Salidas.B:.B]; [.B17]; [Salidas.C:.C])" table:style-name="ce1">
            <text:p>0</text:p>
          </table:table-cell>
          <table:table-cell office:value-type="float" office:value="1" table:formula="of:=[.C17]+[.D17]-[.E17]" table:style-name="ce1">
            <text:p>1</text:p>
          </table:table-cell>
          <table:table-cell office:value-type="string" office:string-value=" PEDIR URGENTE" table:formula="of:=IF([Inventario.$F17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Bornera 18 Salida Lindsay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IF([Entradas.B:.B]; [.B18]; [Entradas.C:.C])" table:style-name="ce1">
            <text:p>0</text:p>
          </table:table-cell>
          <table:table-cell office:value-type="float" office:value="0" table:formula="of:=SUMIF([Salidas.B:.B]; [.B18]; [Salidas.C:.C])" table:style-name="ce1">
            <text:p>0</text:p>
          </table:table-cell>
          <table:table-cell office:value-type="float" office:value="6" table:formula="of:=[.C18]+[.D18]-[.E18]" table:style-name="ce1">
            <text:p>6</text:p>
          </table:table-cell>
          <table:table-cell office:value-type="string" office:string-value=" PEDIR URGENTE" table:formula="of:=IF([Inventario.$F18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Prensa Cable de ½</text:p>
          </table:table-cell>
          <table:table-cell office:value-type="float" office:value="26" table:style-name="ce1">
            <text:p>26</text:p>
          </table:table-cell>
          <table:table-cell office:value-type="float" office:value="0" table:formula="of:=SUMIF([Entradas.B:.B]; [.B19]; [Entradas.C:.C])" table:style-name="ce1">
            <text:p>0</text:p>
          </table:table-cell>
          <table:table-cell office:value-type="float" office:value="0" table:formula="of:=SUMIF([Salidas.B:.B]; [.B19]; [Salidas.C:.C])" table:style-name="ce1">
            <text:p>0</text:p>
          </table:table-cell>
          <table:table-cell office:value-type="float" office:value="26" table:formula="of:=[.C19]+[.D19]-[.E19]" table:style-name="ce1">
            <text:p>26</text:p>
          </table:table-cell>
          <table:table-cell office:value-type="string" office:string-value="STOCK OK" table:formula="of:=IF([Inventario.$F19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Reloj De Porsentaje 6o Seg.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IF([Entradas.B:.B]; [.B20]; [Entradas.C:.C])" table:style-name="ce1">
            <text:p>0</text:p>
          </table:table-cell>
          <table:table-cell office:value-type="float" office:value="0" table:formula="of:=SUMIF([Salidas.B:.B]; [.B20]; [Salidas.C:.C])" table:style-name="ce1">
            <text:p>0</text:p>
          </table:table-cell>
          <table:table-cell office:value-type="float" office:value="5" table:formula="of:=[.C20]+[.D20]-[.E20]" table:style-name="ce1">
            <text:p>5</text:p>
          </table:table-cell>
          <table:table-cell office:value-type="string" office:string-value=" PEDIR URGENTE" table:formula="of:=IF([Inventario.$F20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Reloj De Porsentaje 30 Seg.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21]; [Entradas.C:.C])" table:style-name="ce1">
            <text:p>0</text:p>
          </table:table-cell>
          <table:table-cell office:value-type="float" office:value="0" table:formula="of:=SUMIF([Salidas.B:.B]; [.B21]; [Salidas.C:.C])" table:style-name="ce1">
            <text:p>0</text:p>
          </table:table-cell>
          <table:table-cell office:value-type="float" office:value="2" table:formula="of:=[.C21]+[.D21]-[.E21]" table:style-name="ce1">
            <text:p>2</text:p>
          </table:table-cell>
          <table:table-cell office:value-type="string" office:string-value=" PEDIR URGENTE" table:formula="of:=IF([Inventario.$F21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Temporizador de Retardo 120 v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22]; [Entradas.C:.C])" table:style-name="ce1">
            <text:p>0</text:p>
          </table:table-cell>
          <table:table-cell office:value-type="float" office:value="0" table:formula="of:=SUMIF([Salidas.B:.B]; [.B22]; [Salidas.C:.C])" table:style-name="ce1">
            <text:p>0</text:p>
          </table:table-cell>
          <table:table-cell office:value-type="float" office:value="2" table:formula="of:=[.C22]+[.D22]-[.E22]" table:style-name="ce1">
            <text:p>2</text:p>
          </table:table-cell>
          <table:table-cell office:value-type="string" office:string-value=" PEDIR URGENTE" table:formula="of:=IF([Inventario.$F22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Voltímetro Valley 600 volt.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IF([Entradas.B:.B]; [.B23]; [Entradas.C:.C])" table:style-name="ce1">
            <text:p>0</text:p>
          </table:table-cell>
          <table:table-cell office:value-type="float" office:value="0" table:formula="of:=SUMIF([Salidas.B:.B]; [.B23]; [Salidas.C:.C])" table:style-name="ce1">
            <text:p>0</text:p>
          </table:table-cell>
          <table:table-cell office:value-type="float" office:value="5" table:formula="of:=[.C23]+[.D23]-[.E23]" table:style-name="ce1">
            <text:p>5</text:p>
          </table:table-cell>
          <table:table-cell office:value-type="string" office:string-value=" PEDIR URGENTE" table:formula="of:=IF([Inventario.$F23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Voltímetro Lindsay 600 volt.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IF([Entradas.B:.B]; [.B24]; [Entradas.C:.C])" table:style-name="ce1">
            <text:p>0</text:p>
          </table:table-cell>
          <table:table-cell office:value-type="float" office:value="0" table:formula="of:=SUMIF([Salidas.B:.B]; [.B24]; [Salidas.C:.C])" table:style-name="ce1">
            <text:p>0</text:p>
          </table:table-cell>
          <table:table-cell office:value-type="float" office:value="4" table:formula="of:=[.C24]+[.D24]-[.E24]" table:style-name="ce1">
            <text:p>4</text:p>
          </table:table-cell>
          <table:table-cell office:value-type="string" office:string-value=" PEDIR URGENTE" table:formula="of:=IF([Inventario.$F24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Destellador 120 volt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25]; [Entradas.C:.C])" table:style-name="ce1">
            <text:p>0</text:p>
          </table:table-cell>
          <table:table-cell office:value-type="float" office:value="0" table:formula="of:=SUMIF([Salidas.B:.B]; [.B25]; [Salidas.C:.C])" table:style-name="ce1">
            <text:p>0</text:p>
          </table:table-cell>
          <table:table-cell office:value-type="float" office:value="1" table:formula="of:=[.C25]+[.D25]-[.E25]" table:style-name="ce1">
            <text:p>1</text:p>
          </table:table-cell>
          <table:table-cell office:value-type="string" office:string-value=" PEDIR URGENTE" table:formula="of:=IF([Inventario.$F25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Transformador de Control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IF([Entradas.B:.B]; [.B26]; [Entradas.C:.C])" table:style-name="ce1">
            <text:p>0</text:p>
          </table:table-cell>
          <table:table-cell office:value-type="float" office:value="0" table:formula="of:=SUMIF([Salidas.B:.B]; [.B26]; [Salidas.C:.C])" table:style-name="ce1">
            <text:p>0</text:p>
          </table:table-cell>
          <table:table-cell office:value-type="float" office:value="4" table:formula="of:=[.C26]+[.D26]-[.E26]" table:style-name="ce1">
            <text:p>4</text:p>
          </table:table-cell>
          <table:table-cell office:value-type="string" office:string-value=" PEDIR URGENTE" table:formula="of:=IF([Inventario.$F26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Antenas Guias 991 Hz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IF([Entradas.B:.B]; [.B27]; [Entradas.C:.C])" table:style-name="ce1">
            <text:p>0</text:p>
          </table:table-cell>
          <table:table-cell office:value-type="float" office:value="0" table:formula="of:=SUMIF([Salidas.B:.B]; [.B27]; [Salidas.C:.C])" table:style-name="ce1">
            <text:p>0</text:p>
          </table:table-cell>
          <table:table-cell office:value-type="float" office:value="4" table:formula="of:=[.C27]+[.D27]-[.E27]" table:style-name="ce1">
            <text:p>4</text:p>
          </table:table-cell>
          <table:table-cell office:value-type="string" office:string-value=" PEDIR URGENTE" table:formula="of:=IF([Inventario.$F27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Antenas Seguridad y Referencia 999 Hz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SUMIF([Entradas.B:.B]; [.B28]; [Entradas.C:.C])" table:style-name="ce1">
            <text:p>0</text:p>
          </table:table-cell>
          <table:table-cell office:value-type="float" office:value="0" table:formula="of:=SUMIF([Salidas.B:.B]; [.B28]; [Salidas.C:.C])" table:style-name="ce1">
            <text:p>0</text:p>
          </table:table-cell>
          <table:table-cell office:value-type="float" office:value="7" table:formula="of:=[.C28]+[.D28]-[.E28]" table:style-name="ce1">
            <text:p>7</text:p>
          </table:table-cell>
          <table:table-cell office:value-type="string" office:string-value=" PEDIR URGENTE" table:formula="of:=IF([Inventario.$F28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Para Rayo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29]; [Entradas.C:.C])" table:style-name="ce1">
            <text:p>0</text:p>
          </table:table-cell>
          <table:table-cell office:value-type="float" office:value="0" table:formula="of:=SUMIF([Salidas.B:.B]; [.B29]; [Salidas.C:.C])" table:style-name="ce1">
            <text:p>0</text:p>
          </table:table-cell>
          <table:table-cell office:value-type="float" office:value="2" table:formula="of:=[.C29]+[.D29]-[.E29]" table:style-name="ce1">
            <text:p>2</text:p>
          </table:table-cell>
          <table:table-cell office:value-type="string" office:string-value=" PEDIR URGENTE" table:formula="of:=IF([Inventario.$F29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Modulo Control de Seguridad 035154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30]; [Entradas.C:.C])" table:style-name="ce1">
            <text:p>0</text:p>
          </table:table-cell>
          <table:table-cell office:value-type="float" office:value="0" table:formula="of:=SUMIF([Salidas.B:.B]; [.B30]; [Salidas.C:.C])" table:style-name="ce1">
            <text:p>0</text:p>
          </table:table-cell>
          <table:table-cell office:value-type="float" office:value="1" table:formula="of:=[.C30]+[.D30]-[.E30]" table:style-name="ce1">
            <text:p>1</text:p>
          </table:table-cell>
          <table:table-cell office:value-type="string" office:string-value=" PEDIR URGENTE" table:formula="of:=IF([Inventario.$F30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Modulo Control de Guía 03E150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31]; [Entradas.C:.C])" table:style-name="ce1">
            <text:p>0</text:p>
          </table:table-cell>
          <table:table-cell office:value-type="float" office:value="0" table:formula="of:=SUMIF([Salidas.B:.B]; [.B31]; [Salidas.C:.C])" table:style-name="ce1">
            <text:p>0</text:p>
          </table:table-cell>
          <table:table-cell office:value-type="float" office:value="1" table:formula="of:=[.C31]+[.D31]-[.E31]" table:style-name="ce1">
            <text:p>1</text:p>
          </table:table-cell>
          <table:table-cell office:value-type="string" office:string-value=" PEDIR URGENTE" table:formula="of:=IF([Inventario.$F31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Oscilador o Reseptor S/N 50579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32]; [Entradas.C:.C])" table:style-name="ce1">
            <text:p>0</text:p>
          </table:table-cell>
          <table:table-cell office:value-type="float" office:value="0" table:formula="of:=SUMIF([Salidas.B:.B]; [.B32]; [Salidas.C:.C])" table:style-name="ce1">
            <text:p>0</text:p>
          </table:table-cell>
          <table:table-cell office:value-type="float" office:value="1" table:formula="of:=[.C32]+[.D32]-[.E32]" table:style-name="ce1">
            <text:p>1</text:p>
          </table:table-cell>
          <table:table-cell office:value-type="string" office:string-value=" PEDIR URGENTE" table:formula="of:=IF([Inventario.$F32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aja Box Lindsay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33]; [Entradas.C:.C])" table:style-name="ce1">
            <text:p>0</text:p>
          </table:table-cell>
          <table:table-cell office:value-type="float" office:value="1" table:formula="of:=SUMIF([Salidas.B:.B]; [.B33]; [Salidas.C:.C])" table:style-name="ce1">
            <text:p>1</text:p>
          </table:table-cell>
          <table:table-cell office:value-type="float" office:value="1" table:formula="of:=[.C33]+[.D33]-[.E33]" table:style-name="ce1">
            <text:p>1</text:p>
          </table:table-cell>
          <table:table-cell office:value-type="string" office:string-value=" PEDIR URGENTE" table:formula="of:=IF([Inventario.$F33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Varilla De Alineación</text:p>
          </table:table-cell>
          <table:table-cell office:value-type="float" office:value="34" table:style-name="ce1">
            <text:p>34</text:p>
          </table:table-cell>
          <table:table-cell office:value-type="float" office:value="0" table:formula="of:=SUMIF([Entradas.B:.B]; [.B34]; [Entradas.C:.C])" table:style-name="ce1">
            <text:p>0</text:p>
          </table:table-cell>
          <table:table-cell office:value-type="float" office:value="0" table:formula="of:=SUMIF([Salidas.B:.B]; [.B34]; [Salidas.C:.C])" table:style-name="ce1">
            <text:p>0</text:p>
          </table:table-cell>
          <table:table-cell office:value-type="float" office:value="34" table:formula="of:=[.C34]+[.D34]-[.E34]" table:style-name="ce1">
            <text:p>34</text:p>
          </table:table-cell>
          <table:table-cell office:value-type="string" office:string-value="STOCK OK" table:formula="of:=IF([Inventario.$F34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Junta Para Brida 8”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IF([Entradas.B:.B]; [.B35]; [Entradas.C:.C])" table:style-name="ce1">
            <text:p>0</text:p>
          </table:table-cell>
          <table:table-cell office:value-type="float" office:value="6" table:formula="of:=SUMIF([Salidas.B:.B]; [.B35]; [Salidas.C:.C])" table:style-name="ce1">
            <text:p>6</text:p>
          </table:table-cell>
          <table:table-cell office:value-type="float" office:value="15" table:formula="of:=[.C35]+[.D35]-[.E35]" table:style-name="ce1">
            <text:p>15</text:p>
          </table:table-cell>
          <table:table-cell office:value-type="string" office:string-value="STOCK OK" table:formula="of:=IF([Inventario.$F35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Pack de Crucetas</text:p>
          </table:table-cell>
          <table:table-cell office:value-type="float" office:value="70" table:style-name="ce1">
            <text:p>70</text:p>
          </table:table-cell>
          <table:table-cell office:value-type="float" office:value="0" table:formula="of:=SUMIF([Entradas.B:.B]; [.B36]; [Entradas.C:.C])" table:style-name="ce1">
            <text:p>0</text:p>
          </table:table-cell>
          <table:table-cell office:value-type="float" office:value="0" table:formula="of:=SUMIF([Salidas.B:.B]; [.B36]; [Salidas.C:.C])" table:style-name="ce1">
            <text:p>0</text:p>
          </table:table-cell>
          <table:table-cell office:value-type="float" office:value="70" table:formula="of:=[.C36]+[.D36]-[.E36]" table:style-name="ce1">
            <text:p>70</text:p>
          </table:table-cell>
          <table:table-cell office:value-type="string" office:string-value="STOCK OK" table:formula="of:=IF([Inventario.$F36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Abrazadera de Cremallera ¾</text:p>
          </table:table-cell>
          <table:table-cell office:value-type="float" office:value="73" table:style-name="ce1">
            <text:p>73</text:p>
          </table:table-cell>
          <table:table-cell office:value-type="float" office:value="0" table:formula="of:=SUMIF([Entradas.B:.B]; [.B37]; [Entradas.C:.C])" table:style-name="ce1">
            <text:p>0</text:p>
          </table:table-cell>
          <table:table-cell office:value-type="float" office:value="0" table:formula="of:=SUMIF([Salidas.B:.B]; [.B37]; [Salidas.C:.C])" table:style-name="ce1">
            <text:p>0</text:p>
          </table:table-cell>
          <table:table-cell office:value-type="float" office:value="73" table:formula="of:=[.C37]+[.D37]-[.E37]" table:style-name="ce1">
            <text:p>73</text:p>
          </table:table-cell>
          <table:table-cell office:value-type="string" office:string-value="STOCK OK" table:formula="of:=IF([Inventario.$F37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Abrazadera de Cremallera 1”</text:p>
          </table:table-cell>
          <table:table-cell office:value-type="float" office:value="75" table:style-name="ce1">
            <text:p>75</text:p>
          </table:table-cell>
          <table:table-cell office:value-type="float" office:value="0" table:formula="of:=SUMIF([Entradas.B:.B]; [.B38]; [Entradas.C:.C])" table:style-name="ce1">
            <text:p>0</text:p>
          </table:table-cell>
          <table:table-cell office:value-type="float" office:value="0" table:formula="of:=SUMIF([Salidas.B:.B]; [.B38]; [Salidas.C:.C])" table:style-name="ce1">
            <text:p>0</text:p>
          </table:table-cell>
          <table:table-cell office:value-type="float" office:value="75" table:formula="of:=[.C38]+[.D38]-[.E38]" table:style-name="ce1">
            <text:p>75</text:p>
          </table:table-cell>
          <table:table-cell office:value-type="string" office:string-value="STOCK OK" table:formula="of:=IF([Inventario.$F38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Media Luna (de Rueda)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SUMIF([Entradas.B:.B]; [.B39]; [Entradas.C:.C])" table:style-name="ce1">
            <text:p>0</text:p>
          </table:table-cell>
          <table:table-cell office:value-type="float" office:value="0" table:formula="of:=SUMIF([Salidas.B:.B]; [.B39]; [Salidas.C:.C])" table:style-name="ce1">
            <text:p>0</text:p>
          </table:table-cell>
          <table:table-cell office:value-type="float" office:value="7" table:formula="of:=[.C39]+[.D39]-[.E39]" table:style-name="ce1">
            <text:p>7</text:p>
          </table:table-cell>
          <table:table-cell office:value-type="string" office:string-value=" PEDIR URGENTE" table:formula="of:=IF([Inventario.$F39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Súper Spray UP3</text:p>
          </table:table-cell>
          <table:table-cell office:value-type="float" office:value="54" table:style-name="ce1">
            <text:p>54</text:p>
          </table:table-cell>
          <table:table-cell office:value-type="float" office:value="0" table:formula="of:=SUMIF([Entradas.B:.B]; [.B40]; [Entradas.C:.C])" table:style-name="ce1">
            <text:p>0</text:p>
          </table:table-cell>
          <table:table-cell office:value-type="float" office:value="0" table:formula="of:=SUMIF([Salidas.B:.B]; [.B40]; [Salidas.C:.C])" table:style-name="ce1">
            <text:p>0</text:p>
          </table:table-cell>
          <table:table-cell office:value-type="float" office:value="54" table:formula="of:=[.C40]+[.D40]-[.E40]" table:style-name="ce1">
            <text:p>54</text:p>
          </table:table-cell>
          <table:table-cell office:value-type="string" office:string-value="STOCK OK" table:formula="of:=IF([Inventario.$F40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Espiga Hembra ¾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IF([Entradas.B:.B]; [.B41]; [Entradas.C:.C])" table:style-name="ce1">
            <text:p>0</text:p>
          </table:table-cell>
          <table:table-cell office:value-type="float" office:value="0" table:formula="of:=SUMIF([Salidas.B:.B]; [.B41]; [Salidas.C:.C])" table:style-name="ce1">
            <text:p>0</text:p>
          </table:table-cell>
          <table:table-cell office:value-type="float" office:value="4" table:formula="of:=[.C41]+[.D41]-[.E41]" table:style-name="ce1">
            <text:p>4</text:p>
          </table:table-cell>
          <table:table-cell office:value-type="string" office:string-value=" PEDIR URGENTE" table:formula="of:=IF([Inventario.$F41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Espiga Macho ¾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IF([Entradas.B:.B]; [.B42]; [Entradas.C:.C])" table:style-name="ce1">
            <text:p>0</text:p>
          </table:table-cell>
          <table:table-cell office:value-type="float" office:value="0" table:formula="of:=SUMIF([Salidas.B:.B]; [.B42]; [Salidas.C:.C])" table:style-name="ce1">
            <text:p>0</text:p>
          </table:table-cell>
          <table:table-cell office:value-type="float" office:value="5" table:formula="of:=[.C42]+[.D42]-[.E42]" table:style-name="ce1">
            <text:p>5</text:p>
          </table:table-cell>
          <table:table-cell office:value-type="string" office:string-value=" PEDIR URGENTE" table:formula="of:=IF([Inventario.$F42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Regulador 10 PSI PSR2</text:p>
          </table:table-cell>
          <table:table-cell office:value-type="float" office:value="790" table:style-name="ce1">
            <text:p>790</text:p>
          </table:table-cell>
          <table:table-cell office:value-type="float" office:value="0" table:formula="of:=SUMIF([Entradas.B:.B]; [.B43]; [Entradas.C:.C])" table:style-name="ce1">
            <text:p>0</text:p>
          </table:table-cell>
          <table:table-cell office:value-type="float" office:value="0" table:formula="of:=SUMIF([Salidas.B:.B]; [.B43]; [Salidas.C:.C])" table:style-name="ce1">
            <text:p>0</text:p>
          </table:table-cell>
          <table:table-cell office:value-type="float" office:value="790" table:formula="of:=[.C43]+[.D43]-[.E43]" table:style-name="ce1">
            <text:p>790</text:p>
          </table:table-cell>
          <table:table-cell office:value-type="string" office:string-value="STOCK OK" table:formula="of:=IF([Inventario.$F43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Ferodo 72 Dientes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44]; [Entradas.C:.C])" table:style-name="ce1">
            <text:p>0</text:p>
          </table:table-cell>
          <table:table-cell office:value-type="float" office:value="0" table:formula="of:=SUMIF([Salidas.B:.B]; [.B44]; [Salidas.C:.C])" table:style-name="ce1">
            <text:p>0</text:p>
          </table:table-cell>
          <table:table-cell office:value-type="float" office:value="1" table:formula="of:=[.C44]+[.D44]-[.E44]" table:style-name="ce1">
            <text:p>1</text:p>
          </table:table-cell>
          <table:table-cell office:value-type="string" office:string-value=" PEDIR URGENTE" table:formula="of:=IF([Inventario.$F44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Ferodos 59 dientes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IF([Entradas.B:.B]; [.B45]; [Entradas.C:.C])" table:style-name="ce1">
            <text:p>0</text:p>
          </table:table-cell>
          <table:table-cell office:value-type="float" office:value="0" table:formula="of:=SUMIF([Salidas.B:.B]; [.B45]; [Salidas.C:.C])" table:style-name="ce1">
            <text:p>0</text:p>
          </table:table-cell>
          <table:table-cell office:value-type="float" office:value="5" table:formula="of:=[.C45]+[.D45]-[.E45]" table:style-name="ce1">
            <text:p>5</text:p>
          </table:table-cell>
          <table:table-cell office:value-type="string" office:string-value=" PEDIR URGENTE" table:formula="of:=IF([Inventario.$F45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orona Para Embrague Ranura 7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46]; [Entradas.C:.C])" table:style-name="ce1">
            <text:p>0</text:p>
          </table:table-cell>
          <table:table-cell office:value-type="float" office:value="0" table:formula="of:=SUMIF([Salidas.B:.B]; [.B46]; [Salidas.C:.C])" table:style-name="ce1">
            <text:p>0</text:p>
          </table:table-cell>
          <table:table-cell office:value-type="float" office:value="2" table:formula="of:=[.C46]+[.D46]-[.E46]" table:style-name="ce1">
            <text:p>2</text:p>
          </table:table-cell>
          <table:table-cell office:value-type="string" office:string-value=" PEDIR URGENTE" table:formula="of:=IF([Inventario.$F46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Manchon Para Bomba 8” F1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47]; [Entradas.C:.C])" table:style-name="ce1">
            <text:p>0</text:p>
          </table:table-cell>
          <table:table-cell office:value-type="float" office:value="0" table:formula="of:=SUMIF([Salidas.B:.B]; [.B47]; [Salidas.C:.C])" table:style-name="ce1">
            <text:p>0</text:p>
          </table:table-cell>
          <table:table-cell office:value-type="float" office:value="2" table:formula="of:=[.C47]+[.D47]-[.E47]" table:style-name="ce1">
            <text:p>2</text:p>
          </table:table-cell>
          <table:table-cell office:value-type="string" office:string-value=" PEDIR URGENTE" table:formula="of:=IF([Inventario.$F47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Manchon Para Bomba 8omba 10RB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IF([Entradas.B:.B]; [.B48]; [Entradas.C:.C])" table:style-name="ce1">
            <text:p>0</text:p>
          </table:table-cell>
          <table:table-cell office:value-type="float" office:value="0" table:formula="of:=SUMIF([Salidas.B:.B]; [.B48]; [Salidas.C:.C])" table:style-name="ce1">
            <text:p>0</text:p>
          </table:table-cell>
          <table:table-cell office:value-type="float" office:value="0" table:formula="of:=[.C48]+[.D48]-[.E48]" table:style-name="ce1">
            <text:p>0</text:p>
          </table:table-cell>
          <table:table-cell office:value-type="string" office:string-value=" PEDIR URGENTE" table:formula="of:=IF([Inventario.$F48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Valvulas de Drenaje Valley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SUMIF([Entradas.B:.B]; [.B49]; [Entradas.C:.C])" table:style-name="ce1">
            <text:p>0</text:p>
          </table:table-cell>
          <table:table-cell office:value-type="float" office:value="0" table:formula="of:=SUMIF([Salidas.B:.B]; [.B49]; [Salidas.C:.C])" table:style-name="ce1">
            <text:p>0</text:p>
          </table:table-cell>
          <table:table-cell office:value-type="float" office:value="32" table:formula="of:=[.C49]+[.D49]-[.E49]" table:style-name="ce1">
            <text:p>32</text:p>
          </table:table-cell>
          <table:table-cell office:value-type="string" office:string-value="STOCK OK" table:formula="of:=IF([Inventario.$F49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uello de Cisne Plástico</text:p>
          </table:table-cell>
          <table:table-cell office:value-type="float" office:value="141" table:style-name="ce1">
            <text:p>141</text:p>
          </table:table-cell>
          <table:table-cell office:value-type="float" office:value="0" table:formula="of:=SUMIF([Entradas.B:.B]; [.B50]; [Entradas.C:.C])" table:style-name="ce1">
            <text:p>0</text:p>
          </table:table-cell>
          <table:table-cell office:value-type="float" office:value="9" table:formula="of:=SUMIF([Salidas.B:.B]; [.B50]; [Salidas.C:.C])" table:style-name="ce1">
            <text:p>9</text:p>
          </table:table-cell>
          <table:table-cell office:value-type="float" office:value="132" table:formula="of:=[.C50]+[.D50]-[.E50]" table:style-name="ce1">
            <text:p>132</text:p>
          </table:table-cell>
          <table:table-cell office:value-type="string" office:string-value="STOCK OK" table:formula="of:=IF([Inventario.$F50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Aspersor I-WOB 2 ¾ B3 UP3 V1</text:p>
          </table:table-cell>
          <table:table-cell office:value-type="float" office:value="52" table:style-name="ce1">
            <text:p>52</text:p>
          </table:table-cell>
          <table:table-cell office:value-type="float" office:value="0" table:formula="of:=SUMIF([Entradas.B:.B]; [.B51]; [Entradas.C:.C])" table:style-name="ce1">
            <text:p>0</text:p>
          </table:table-cell>
          <table:table-cell office:value-type="float" office:value="0" table:formula="of:=SUMIF([Salidas.B:.B]; [.B51]; [Salidas.C:.C])" table:style-name="ce1">
            <text:p>0</text:p>
          </table:table-cell>
          <table:table-cell office:value-type="float" office:value="52" table:formula="of:=[.C51]+[.D51]-[.E51]" table:style-name="ce1">
            <text:p>52</text:p>
          </table:table-cell>
          <table:table-cell office:value-type="string" office:string-value="STOCK OK" table:formula="of:=IF([Inventario.$F51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02 AKF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52]; [Entradas.C:.C])" table:style-name="ce1">
            <text:p>0</text:p>
          </table:table-cell>
          <table:table-cell office:value-type="float" office:value="0" table:formula="of:=SUMIF([Salidas.B:.B]; [.B52]; [Salidas.C:.C])" table:style-name="ce1">
            <text:p>0</text:p>
          </table:table-cell>
          <table:table-cell office:value-type="float" office:value="2" table:formula="of:=[.C52]+[.D52]-[.E52]" table:style-name="ce1">
            <text:p>2</text:p>
          </table:table-cell>
          <table:table-cell office:value-type="string" office:string-value=" PEDIR URGENTE" table:formula="of:=IF([Inventario.$F52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03 Timken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SUMIF([Entradas.B:.B]; [.B53]; [Entradas.C:.C])" table:style-name="ce1">
            <text:p>0</text:p>
          </table:table-cell>
          <table:table-cell office:value-type="float" office:value="0" table:formula="of:=SUMIF([Salidas.B:.B]; [.B53]; [Salidas.C:.C])" table:style-name="ce1">
            <text:p>0</text:p>
          </table:table-cell>
          <table:table-cell office:value-type="float" office:value="7" table:formula="of:=[.C53]+[.D53]-[.E53]" table:style-name="ce1">
            <text:p>7</text:p>
          </table:table-cell>
          <table:table-cell office:value-type="string" office:string-value=" PEDIR URGENTE" table:formula="of:=IF([Inventario.$F53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05 SKF</text:p>
          </table:table-cell>
          <table:table-cell office:value-type="float" office:value="38" table:style-name="ce1">
            <text:p>38</text:p>
          </table:table-cell>
          <table:table-cell office:value-type="float" office:value="0" table:formula="of:=SUMIF([Entradas.B:.B]; [.B54]; [Entradas.C:.C])" table:style-name="ce1">
            <text:p>0</text:p>
          </table:table-cell>
          <table:table-cell office:value-type="float" office:value="0" table:formula="of:=SUMIF([Salidas.B:.B]; [.B54]; [Salidas.C:.C])" table:style-name="ce1">
            <text:p>0</text:p>
          </table:table-cell>
          <table:table-cell office:value-type="float" office:value="38" table:formula="of:=[.C54]+[.D54]-[.E54]" table:style-name="ce1">
            <text:p>38</text:p>
          </table:table-cell>
          <table:table-cell office:value-type="string" office:string-value="STOCK OK" table:formula="of:=IF([Inventario.$F54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204 SKF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IF([Entradas.B:.B]; [.B55]; [Entradas.C:.C])" table:style-name="ce1">
            <text:p>0</text:p>
          </table:table-cell>
          <table:table-cell office:value-type="float" office:value="0" table:formula="of:=SUMIF([Salidas.B:.B]; [.B55]; [Salidas.C:.C])" table:style-name="ce1">
            <text:p>0</text:p>
          </table:table-cell>
          <table:table-cell office:value-type="float" office:value="16" table:formula="of:=[.C55]+[.D55]-[.E55]" table:style-name="ce1">
            <text:p>16</text:p>
          </table:table-cell>
          <table:table-cell office:value-type="string" office:string-value="STOCK OK" table:formula="of:=IF([Inventario.$F55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04 SKF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IF([Entradas.B:.B]; [.B56]; [Entradas.C:.C])" table:style-name="ce1">
            <text:p>0</text:p>
          </table:table-cell>
          <table:table-cell office:value-type="float" office:value="0" table:formula="of:=SUMIF([Salidas.B:.B]; [.B56]; [Salidas.C:.C])" table:style-name="ce1">
            <text:p>0</text:p>
          </table:table-cell>
          <table:table-cell office:value-type="float" office:value="22" table:formula="of:=[.C56]+[.D56]-[.E56]" table:style-name="ce1">
            <text:p>22</text:p>
          </table:table-cell>
          <table:table-cell office:value-type="string" office:string-value="STOCK OK" table:formula="of:=IF([Inventario.$F56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205 SKF</text:p>
          </table:table-cell>
          <table:table-cell office:value-type="float" office:value="39" table:style-name="ce1">
            <text:p>39</text:p>
          </table:table-cell>
          <table:table-cell office:value-type="float" office:value="0" table:formula="of:=SUMIF([Entradas.B:.B]; [.B57]; [Entradas.C:.C])" table:style-name="ce1">
            <text:p>0</text:p>
          </table:table-cell>
          <table:table-cell office:value-type="float" office:value="0" table:formula="of:=SUMIF([Salidas.B:.B]; [.B57]; [Salidas.C:.C])" table:style-name="ce1">
            <text:p>0</text:p>
          </table:table-cell>
          <table:table-cell office:value-type="float" office:value="39" table:formula="of:=[.C57]+[.D57]-[.E57]" table:style-name="ce1">
            <text:p>39</text:p>
          </table:table-cell>
          <table:table-cell office:value-type="string" office:string-value="STOCK OK" table:formula="of:=IF([Inventario.$F57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O6 SKF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IF([Entradas.B:.B]; [.B58]; [Entradas.C:.C])" table:style-name="ce1">
            <text:p>0</text:p>
          </table:table-cell>
          <table:table-cell office:value-type="float" office:value="0" table:formula="of:=SUMIF([Salidas.B:.B]; [.B58]; [Salidas.C:.C])" table:style-name="ce1">
            <text:p>0</text:p>
          </table:table-cell>
          <table:table-cell office:value-type="float" office:value="22" table:formula="of:=[.C58]+[.D58]-[.E58]" table:style-name="ce1">
            <text:p>22</text:p>
          </table:table-cell>
          <table:table-cell office:value-type="string" office:string-value="STOCK OK" table:formula="of:=IF([Inventario.$F58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206 SKF</text:p>
          </table:table-cell>
          <table:table-cell office:value-type="float" office:value="68" table:style-name="ce1">
            <text:p>68</text:p>
          </table:table-cell>
          <table:table-cell office:value-type="float" office:value="0" table:formula="of:=SUMIF([Entradas.B:.B]; [.B59]; [Entradas.C:.C])" table:style-name="ce1">
            <text:p>0</text:p>
          </table:table-cell>
          <table:table-cell office:value-type="float" office:value="0" table:formula="of:=SUMIF([Salidas.B:.B]; [.B59]; [Salidas.C:.C])" table:style-name="ce1">
            <text:p>0</text:p>
          </table:table-cell>
          <table:table-cell office:value-type="float" office:value="68" table:formula="of:=[.C59]+[.D59]-[.E59]" table:style-name="ce1">
            <text:p>68</text:p>
          </table:table-cell>
          <table:table-cell office:value-type="string" office:string-value="STOCK OK" table:formula="of:=IF([Inventario.$F59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210 UC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60]; [Entradas.C:.C])" table:style-name="ce1">
            <text:p>0</text:p>
          </table:table-cell>
          <table:table-cell office:value-type="float" office:value="0" table:formula="of:=SUMIF([Salidas.B:.B]; [.B60]; [Salidas.C:.C])" table:style-name="ce1">
            <text:p>0</text:p>
          </table:table-cell>
          <table:table-cell office:value-type="float" office:value="2" table:formula="of:=[.C60]+[.D60]-[.E60]" table:style-name="ce1">
            <text:p>2</text:p>
          </table:table-cell>
          <table:table-cell office:value-type="string" office:string-value=" PEDIR URGENTE" table:formula="of:=IF([Inventario.$F60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208 UC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61]; [Entradas.C:.C])" table:style-name="ce1">
            <text:p>0</text:p>
          </table:table-cell>
          <table:table-cell office:value-type="float" office:value="0" table:formula="of:=SUMIF([Salidas.B:.B]; [.B61]; [Salidas.C:.C])" table:style-name="ce1">
            <text:p>0</text:p>
          </table:table-cell>
          <table:table-cell office:value-type="float" office:value="2" table:formula="of:=[.C61]+[.D61]-[.E61]" table:style-name="ce1">
            <text:p>2</text:p>
          </table:table-cell>
          <table:table-cell office:value-type="string" office:string-value=" PEDIR URGENTE" table:formula="of:=IF([Inventario.$F61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89446/10 KOYO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IF([Entradas.B:.B]; [.B62]; [Entradas.C:.C])" table:style-name="ce1">
            <text:p>0</text:p>
          </table:table-cell>
          <table:table-cell office:value-type="float" office:value="0" table:formula="of:=SUMIF([Salidas.B:.B]; [.B62]; [Salidas.C:.C])" table:style-name="ce1">
            <text:p>0</text:p>
          </table:table-cell>
          <table:table-cell office:value-type="float" office:value="4" table:formula="of:=[.C62]+[.D62]-[.E62]" table:style-name="ce1">
            <text:p>4</text:p>
          </table:table-cell>
          <table:table-cell office:value-type="string" office:string-value=" PEDIR URGENTE" table:formula="of:=IF([Inventario.$F62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89446/10 ITALY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SUMIF([Entradas.B:.B]; [.B63]; [Entradas.C:.C])" table:style-name="ce1">
            <text:p>0</text:p>
          </table:table-cell>
          <table:table-cell office:value-type="float" office:value="0" table:formula="of:=SUMIF([Salidas.B:.B]; [.B63]; [Salidas.C:.C])" table:style-name="ce1">
            <text:p>0</text:p>
          </table:table-cell>
          <table:table-cell office:value-type="float" office:value="7" table:formula="of:=[.C63]+[.D63]-[.E63]" table:style-name="ce1">
            <text:p>7</text:p>
          </table:table-cell>
          <table:table-cell office:value-type="string" office:string-value=" PEDIR URGENTE" table:formula="of:=IF([Inventario.$F63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89446/10 TIMKEN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IF([Entradas.B:.B]; [.B64]; [Entradas.C:.C])" table:style-name="ce1">
            <text:p>0</text:p>
          </table:table-cell>
          <table:table-cell office:value-type="float" office:value="0" table:formula="of:=SUMIF([Salidas.B:.B]; [.B64]; [Salidas.C:.C])" table:style-name="ce1">
            <text:p>0</text:p>
          </table:table-cell>
          <table:table-cell office:value-type="float" office:value="21" table:formula="of:=[.C64]+[.D64]-[.E64]" table:style-name="ce1">
            <text:p>21</text:p>
          </table:table-cell>
          <table:table-cell office:value-type="string" office:string-value="STOCK OK" table:formula="of:=IF([Inventario.$F64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13 ITALY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IF([Entradas.B:.B]; [.B65]; [Entradas.C:.C])" table:style-name="ce1">
            <text:p>0</text:p>
          </table:table-cell>
          <table:table-cell office:value-type="float" office:value="0" table:formula="of:=SUMIF([Salidas.B:.B]; [.B65]; [Salidas.C:.C])" table:style-name="ce1">
            <text:p>0</text:p>
          </table:table-cell>
          <table:table-cell office:value-type="float" office:value="4" table:formula="of:=[.C65]+[.D65]-[.E65]" table:style-name="ce1">
            <text:p>4</text:p>
          </table:table-cell>
          <table:table-cell office:value-type="string" office:string-value=" PEDIR URGENTE" table:formula="of:=IF([Inventario.$F65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12 SKF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IF([Entradas.B:.B]; [.B66]; [Entradas.C:.C])" table:style-name="ce1">
            <text:p>0</text:p>
          </table:table-cell>
          <table:table-cell office:value-type="float" office:value="0" table:formula="of:=SUMIF([Salidas.B:.B]; [.B66]; [Salidas.C:.C])" table:style-name="ce1">
            <text:p>0</text:p>
          </table:table-cell>
          <table:table-cell office:value-type="float" office:value="5" table:formula="of:=[.C66]+[.D66]-[.E66]" table:style-name="ce1">
            <text:p>5</text:p>
          </table:table-cell>
          <table:table-cell office:value-type="string" office:string-value=" PEDIR URGENTE" table:formula="of:=IF([Inventario.$F66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12 URB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IF([Entradas.B:.B]; [.B67]; [Entradas.C:.C])" table:style-name="ce1">
            <text:p>0</text:p>
          </table:table-cell>
          <table:table-cell office:value-type="float" office:value="0" table:formula="of:=SUMIF([Salidas.B:.B]; [.B67]; [Salidas.C:.C])" table:style-name="ce1">
            <text:p>0</text:p>
          </table:table-cell>
          <table:table-cell office:value-type="float" office:value="3" table:formula="of:=[.C67]+[.D67]-[.E67]" table:style-name="ce1">
            <text:p>3</text:p>
          </table:table-cell>
          <table:table-cell office:value-type="string" office:string-value=" PEDIR URGENTE" table:formula="of:=IF([Inventario.$F67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88649/10 KOYO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SUMIF([Entradas.B:.B]; [.B68]; [Entradas.C:.C])" table:style-name="ce1">
            <text:p>0</text:p>
          </table:table-cell>
          <table:table-cell office:value-type="float" office:value="0" table:formula="of:=SUMIF([Salidas.B:.B]; [.B68]; [Salidas.C:.C])" table:style-name="ce1">
            <text:p>0</text:p>
          </table:table-cell>
          <table:table-cell office:value-type="float" office:value="100" table:formula="of:=[.C68]+[.D68]-[.E68]" table:style-name="ce1">
            <text:p>100</text:p>
          </table:table-cell>
          <table:table-cell office:value-type="string" office:string-value="STOCK OK" table:formula="of:=IF([Inventario.$F68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89446/10 KOYO</text:p>
          </table:table-cell>
          <table:table-cell office:value-type="float" office:value="99" table:style-name="ce1">
            <text:p>99</text:p>
          </table:table-cell>
          <table:table-cell office:value-type="float" office:value="0" table:formula="of:=SUMIF([Entradas.B:.B]; [.B69]; [Entradas.C:.C])" table:style-name="ce1">
            <text:p>0</text:p>
          </table:table-cell>
          <table:table-cell office:value-type="float" office:value="0" table:formula="of:=SUMIF([Salidas.B:.B]; [.B69]; [Salidas.C:.C])" table:style-name="ce1">
            <text:p>0</text:p>
          </table:table-cell>
          <table:table-cell office:value-type="float" office:value="99" table:formula="of:=[.C69]+[.D69]-[.E69]" table:style-name="ce1">
            <text:p>99</text:p>
          </table:table-cell>
          <table:table-cell office:value-type="string" office:string-value="STOCK OK" table:formula="of:=IF([Inventario.$F69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88648/10 KOYO</text:p>
          </table:table-cell>
          <table:table-cell office:value-type="float" office:value="98" table:style-name="ce1">
            <text:p>98</text:p>
          </table:table-cell>
          <table:table-cell office:value-type="float" office:value="0" table:formula="of:=SUMIF([Entradas.B:.B]; [.B70]; [Entradas.C:.C])" table:style-name="ce1">
            <text:p>0</text:p>
          </table:table-cell>
          <table:table-cell office:value-type="float" office:value="0" table:formula="of:=SUMIF([Salidas.B:.B]; [.B70]; [Salidas.C:.C])" table:style-name="ce1">
            <text:p>0</text:p>
          </table:table-cell>
          <table:table-cell office:value-type="float" office:value="98" table:formula="of:=[.C70]+[.D70]-[.E70]" table:style-name="ce1">
            <text:p>98</text:p>
          </table:table-cell>
          <table:table-cell office:value-type="string" office:string-value="STOCK OK" table:formula="of:=IF([Inventario.$F70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89443/10 NTN</text:p>
          </table:table-cell>
          <table:table-cell office:value-type="float" office:value="33" table:style-name="ce1">
            <text:p>33</text:p>
          </table:table-cell>
          <table:table-cell office:value-type="float" office:value="0" table:formula="of:=SUMIF([Entradas.B:.B]; [.B71]; [Entradas.C:.C])" table:style-name="ce1">
            <text:p>0</text:p>
          </table:table-cell>
          <table:table-cell office:value-type="float" office:value="0" table:formula="of:=SUMIF([Salidas.B:.B]; [.B71]; [Salidas.C:.C])" table:style-name="ce1">
            <text:p>0</text:p>
          </table:table-cell>
          <table:table-cell office:value-type="float" office:value="33" table:formula="of:=[.C71]+[.D71]-[.E71]" table:style-name="ce1">
            <text:p>33</text:p>
          </table:table-cell>
          <table:table-cell office:value-type="string" office:string-value="STOCK OK" table:formula="of:=IF([Inventario.$F71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387A/382A KOYO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IF([Entradas.B:.B]; [.B72]; [Entradas.C:.C])" table:style-name="ce1">
            <text:p>0</text:p>
          </table:table-cell>
          <table:table-cell office:value-type="float" office:value="0" table:formula="of:=SUMIF([Salidas.B:.B]; [.B72]; [Salidas.C:.C])" table:style-name="ce1">
            <text:p>0</text:p>
          </table:table-cell>
          <table:table-cell office:value-type="float" office:value="20" table:formula="of:=[.C72]+[.D72]-[.E72]" table:style-name="ce1">
            <text:p>20</text:p>
          </table:table-cell>
          <table:table-cell office:value-type="string" office:string-value="STOCK OK" table:formula="of:=IF([Inventario.$F72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387A/382S KOYO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IF([Entradas.B:.B]; [.B73]; [Entradas.C:.C])" table:style-name="ce1">
            <text:p>0</text:p>
          </table:table-cell>
          <table:table-cell office:value-type="float" office:value="0" table:formula="of:=SUMIF([Salidas.B:.B]; [.B73]; [Salidas.C:.C])" table:style-name="ce1">
            <text:p>0</text:p>
          </table:table-cell>
          <table:table-cell office:value-type="float" office:value="2" table:formula="of:=[.C73]+[.D73]-[.E73]" table:style-name="ce1">
            <text:p>2</text:p>
          </table:table-cell>
          <table:table-cell office:value-type="string" office:string-value=" PEDIR URGENTE" table:formula="of:=IF([Inventario.$F73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387/382 KOYO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74]; [Entradas.C:.C])" table:style-name="ce1">
            <text:p>0</text:p>
          </table:table-cell>
          <table:table-cell office:value-type="float" office:value="0" table:formula="of:=SUMIF([Salidas.B:.B]; [.B74]; [Salidas.C:.C])" table:style-name="ce1">
            <text:p>0</text:p>
          </table:table-cell>
          <table:table-cell office:value-type="float" office:value="1" table:formula="of:=[.C74]+[.D74]-[.E74]" table:style-name="ce1">
            <text:p>1</text:p>
          </table:table-cell>
          <table:table-cell office:value-type="string" office:string-value=" PEDIR URGENTE" table:formula="of:=IF([Inventario.$F74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387A/382A ITALY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75]; [Entradas.C:.C])" table:style-name="ce1">
            <text:p>0</text:p>
          </table:table-cell>
          <table:table-cell office:value-type="float" office:value="0" table:formula="of:=SUMIF([Salidas.B:.B]; [.B75]; [Salidas.C:.C])" table:style-name="ce1">
            <text:p>0</text:p>
          </table:table-cell>
          <table:table-cell office:value-type="float" office:value="1" table:formula="of:=[.C75]+[.D75]-[.E75]" table:style-name="ce1">
            <text:p>1</text:p>
          </table:table-cell>
          <table:table-cell office:value-type="string" office:string-value=" PEDIR URGENTE" table:formula="of:=IF([Inventario.$F75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44649/10 TIMKEN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IF([Entradas.B:.B]; [.B76]; [Entradas.C:.C])" table:style-name="ce1">
            <text:p>0</text:p>
          </table:table-cell>
          <table:table-cell office:value-type="float" office:value="0" table:formula="of:=SUMIF([Salidas.B:.B]; [.B76]; [Salidas.C:.C])" table:style-name="ce1">
            <text:p>0</text:p>
          </table:table-cell>
          <table:table-cell office:value-type="float" office:value="12" table:formula="of:=[.C76]+[.D76]-[.E76]" table:style-name="ce1">
            <text:p>12</text:p>
          </table:table-cell>
          <table:table-cell office:value-type="string" office:string-value="STOCK OK" table:formula="of:=IF([Inventario.$F76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104949/11 KOYO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SUMIF([Entradas.B:.B]; [.B77]; [Entradas.C:.C])" table:style-name="ce1">
            <text:p>0</text:p>
          </table:table-cell>
          <table:table-cell office:value-type="float" office:value="0" table:formula="of:=SUMIF([Salidas.B:.B]; [.B77]; [Salidas.C:.C])" table:style-name="ce1">
            <text:p>0</text:p>
          </table:table-cell>
          <table:table-cell office:value-type="float" office:value="24" table:formula="of:=[.C77]+[.D77]-[.E77]" table:style-name="ce1">
            <text:p>24</text:p>
          </table:table-cell>
          <table:table-cell office:value-type="string" office:string-value="STOCK OK" table:formula="of:=IF([Inventario.$F77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104949/10 KOYO</text:p>
          </table:table-cell>
          <table:table-cell office:value-type="float" office:value="23" table:style-name="ce1">
            <text:p>23</text:p>
          </table:table-cell>
          <table:table-cell office:value-type="float" office:value="0" table:formula="of:=SUMIF([Entradas.B:.B]; [.B78]; [Entradas.C:.C])" table:style-name="ce1">
            <text:p>0</text:p>
          </table:table-cell>
          <table:table-cell office:value-type="float" office:value="0" table:formula="of:=SUMIF([Salidas.B:.B]; [.B78]; [Salidas.C:.C])" table:style-name="ce1">
            <text:p>0</text:p>
          </table:table-cell>
          <table:table-cell office:value-type="float" office:value="23" table:formula="of:=[.C78]+[.D78]-[.E78]" table:style-name="ce1">
            <text:p>23</text:p>
          </table:table-cell>
          <table:table-cell office:value-type="string" office:string-value="STOCK OK" table:formula="of:=IF([Inventario.$F78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86649/10 KOYO</text:p>
          </table:table-cell>
          <table:table-cell office:value-type="float" office:value="93" table:style-name="ce1">
            <text:p>93</text:p>
          </table:table-cell>
          <table:table-cell office:value-type="float" office:value="0" table:formula="of:=SUMIF([Entradas.B:.B]; [.B79]; [Entradas.C:.C])" table:style-name="ce1">
            <text:p>0</text:p>
          </table:table-cell>
          <table:table-cell office:value-type="float" office:value="0" table:formula="of:=SUMIF([Salidas.B:.B]; [.B79]; [Salidas.C:.C])" table:style-name="ce1">
            <text:p>0</text:p>
          </table:table-cell>
          <table:table-cell office:value-type="float" office:value="93" table:formula="of:=[.C79]+[.D79]-[.E79]" table:style-name="ce1">
            <text:p>93</text:p>
          </table:table-cell>
          <table:table-cell office:value-type="string" office:string-value="STOCK OK" table:formula="of:=IF([Inventario.$F79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ulemanes</text:p>
          </table:table-cell>
          <table:table-cell office:value-type="string" table:style-name="ce4">
            <text:p>6310 TIMKEN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UMIF([Entradas.B:.B]; [.B80]; [Entradas.C:.C])" table:style-name="ce1">
            <text:p>0</text:p>
          </table:table-cell>
          <table:table-cell office:value-type="float" office:value="0" table:formula="of:=SUMIF([Salidas.B:.B]; [.B80]; [Salidas.C:.C])" table:style-name="ce1">
            <text:p>0</text:p>
          </table:table-cell>
          <table:table-cell office:value-type="float" office:value="1" table:formula="of:=[.C80]+[.D80]-[.E80]" table:style-name="ce1">
            <text:p>1</text:p>
          </table:table-cell>
          <table:table-cell office:value-type="string" office:string-value=" PEDIR URGENTE" table:formula="of:=IF([Inventario.$F80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tenes</text:p>
          </table:table-cell>
          <table:table-cell office:value-type="string" table:style-name="ce4">
            <text:p>7546 SAV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SUMIF([Entradas.B:.B]; [.B81]; [Entradas.C:.C])" table:style-name="ce1">
            <text:p>0</text:p>
          </table:table-cell>
          <table:table-cell office:value-type="float" office:value="0" table:formula="of:=SUMIF([Salidas.B:.B]; [.B81]; [Salidas.C:.C])" table:style-name="ce1">
            <text:p>0</text:p>
          </table:table-cell>
          <table:table-cell office:value-type="float" office:value="100" table:formula="of:=[.C81]+[.D81]-[.E81]" table:style-name="ce1">
            <text:p>100</text:p>
          </table:table-cell>
          <table:table-cell office:value-type="string" office:string-value="STOCK OK" table:formula="of:=IF([Inventario.$F81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tenes</text:p>
          </table:table-cell>
          <table:table-cell office:value-type="string" table:style-name="ce4">
            <text:p>7237 SAV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SUMIF([Entradas.B:.B]; [.B82]; [Entradas.C:.C])" table:style-name="ce1">
            <text:p>0</text:p>
          </table:table-cell>
          <table:table-cell office:value-type="float" office:value="0" table:formula="of:=SUMIF([Salidas.B:.B]; [.B82]; [Salidas.C:.C])" table:style-name="ce1">
            <text:p>0</text:p>
          </table:table-cell>
          <table:table-cell office:value-type="float" office:value="100" table:formula="of:=[.C82]+[.D82]-[.E82]" table:style-name="ce1">
            <text:p>100</text:p>
          </table:table-cell>
          <table:table-cell office:value-type="string" office:string-value="STOCK OK" table:formula="of:=IF([Inventario.$F82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tenes</text:p>
          </table:table-cell>
          <table:table-cell office:value-type="string" table:style-name="ce4">
            <text:p>5885 SAV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SUMIF([Entradas.B:.B]; [.B83]; [Entradas.C:.C])" table:style-name="ce1">
            <text:p>0</text:p>
          </table:table-cell>
          <table:table-cell office:value-type="float" office:value="0" table:formula="of:=SUMIF([Salidas.B:.B]; [.B83]; [Salidas.C:.C])" table:style-name="ce1">
            <text:p>0</text:p>
          </table:table-cell>
          <table:table-cell office:value-type="float" office:value="100" table:formula="of:=[.C83]+[.D83]-[.E83]" table:style-name="ce1">
            <text:p>100</text:p>
          </table:table-cell>
          <table:table-cell office:value-type="string" office:string-value="STOCK OK" table:formula="of:=IF([Inventario.$F83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tenes</text:p>
          </table:table-cell>
          <table:table-cell office:value-type="string" table:style-name="ce4">
            <text:p>5371 SAV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SUMIF([Entradas.B:.B]; [.B84]; [Entradas.C:.C])" table:style-name="ce1">
            <text:p>0</text:p>
          </table:table-cell>
          <table:table-cell office:value-type="float" office:value="0" table:formula="of:=SUMIF([Salidas.B:.B]; [.B84]; [Salidas.C:.C])" table:style-name="ce1">
            <text:p>0</text:p>
          </table:table-cell>
          <table:table-cell office:value-type="float" office:value="100" table:formula="of:=[.C84]+[.D84]-[.E84]" table:style-name="ce1">
            <text:p>100</text:p>
          </table:table-cell>
          <table:table-cell office:value-type="string" office:string-value="STOCK OK" table:formula="of:=IF([Inventario.$F84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tenes</text:p>
          </table:table-cell>
          <table:table-cell office:value-type="string" table:style-name="ce4">
            <text:p>6011 SAV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SUMIF([Entradas.B:.B]; [.B85]; [Entradas.C:.C])" table:style-name="ce1">
            <text:p>0</text:p>
          </table:table-cell>
          <table:table-cell office:value-type="float" office:value="0" table:formula="of:=SUMIF([Salidas.B:.B]; [.B85]; [Salidas.C:.C])" table:style-name="ce1">
            <text:p>0</text:p>
          </table:table-cell>
          <table:table-cell office:value-type="float" office:value="100" table:formula="of:=[.C85]+[.D85]-[.E85]" table:style-name="ce1">
            <text:p>100</text:p>
          </table:table-cell>
          <table:table-cell office:value-type="string" office:string-value="STOCK OK" table:formula="of:=IF([Inventario.$F85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tenes</text:p>
          </table:table-cell>
          <table:table-cell office:value-type="string" table:style-name="ce4">
            <text:p>5650 SAV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SUMIF([Entradas.B:.B]; [.B86]; [Entradas.C:.C])" table:style-name="ce1">
            <text:p>0</text:p>
          </table:table-cell>
          <table:table-cell office:value-type="float" office:value="0" table:formula="of:=SUMIF([Salidas.B:.B]; [.B86]; [Salidas.C:.C])" table:style-name="ce1">
            <text:p>0</text:p>
          </table:table-cell>
          <table:table-cell office:value-type="float" office:value="100" table:formula="of:=[.C86]+[.D86]-[.E86]" table:style-name="ce1">
            <text:p>100</text:p>
          </table:table-cell>
          <table:table-cell office:value-type="string" office:string-value="STOCK OK" table:formula="of:=IF([Inventario.$F86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tenes</text:p>
          </table:table-cell>
          <table:table-cell office:value-type="string" table:style-name="ce4">
            <office:annotation draw:style-name="a0" svg:x="3.66666666666667in" svg:y="14.6666666666667in" svg:width="1in" svg:height="0.85in">
              <dc:creator/>
              <text:p><text:span text:style-name="T1">RETEN:</text:span><text:span text:style-name="T1"/></text:p>
              <text:p><text:span text:style-name="T1">Doble labio chico para cajas reductoras</text:span><text:span text:style-name="T1"/></text:p>
              <text:p><text:span text:style-name="T1">valley</text:span></text:p>
            </office:annotation>
            <text:p>99175AP1 Doble Labio chico TCM</text:p>
          </table:table-cell>
          <table:table-cell office:value-type="float" office:value="74" table:style-name="ce1">
            <text:p>74</text:p>
          </table:table-cell>
          <table:table-cell office:value-type="float" office:value="0" table:formula="of:=SUMIF([Entradas.B:.B]; [.B87]; [Entradas.C:.C])" table:style-name="ce1">
            <text:p>0</text:p>
          </table:table-cell>
          <table:table-cell office:value-type="float" office:value="0" table:formula="of:=SUMIF([Salidas.B:.B]; [.B87]; [Salidas.C:.C])" table:style-name="ce1">
            <text:p>0</text:p>
          </table:table-cell>
          <table:table-cell office:value-type="float" office:value="74" table:formula="of:=[.C87]+[.D87]-[.E87]" table:style-name="ce1">
            <text:p>74</text:p>
          </table:table-cell>
          <table:table-cell office:value-type="string" office:string-value="STOCK OK" table:formula="of:=IF([Inventario.$F87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tenes</text:p>
          </table:table-cell>
          <table:table-cell office:value-type="string" table:style-name="ce4">
            <office:annotation draw:style-name="a1" svg:x="3.775in" svg:y="16.5666666666667in" svg:width="1.01666666666667in" svg:height="1in">
              <dc:creator/>
              <text:p><text:span text:style-name="T1">Reten:</text:span><text:span text:style-name="T1"/></text:p>
              <text:p><text:span text:style-name="T1">Doble labio grande para cajas reductora valley</text:span><text:span text:style-name="T1"/></text:p>
              <text:p/>
            </office:annotation>
            <text:p>22430GAP5Y Doble Labio grande TCM</text:p>
          </table:table-cell>
          <table:table-cell office:value-type="float" office:value="97" table:style-name="ce1">
            <text:p>97</text:p>
          </table:table-cell>
          <table:table-cell office:value-type="float" office:value="0" table:formula="of:=SUMIF([Entradas.B:.B]; [.B88]; [Entradas.C:.C])" table:style-name="ce1">
            <text:p>0</text:p>
          </table:table-cell>
          <table:table-cell office:value-type="float" office:value="0" table:formula="of:=SUMIF([Salidas.B:.B]; [.B88]; [Salidas.C:.C])" table:style-name="ce1">
            <text:p>0</text:p>
          </table:table-cell>
          <table:table-cell office:value-type="float" office:value="97" table:formula="of:=[.C88]+[.D88]-[.E88]" table:style-name="ce1">
            <text:p>97</text:p>
          </table:table-cell>
          <table:table-cell office:value-type="string" office:string-value="STOCK OK" table:formula="of:=IF([Inventario.$F88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Sin Fin Frontal VALLEY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IF([Entradas.B:.B]; [.B89]; [Entradas.C:.C])" table:style-name="ce1">
            <text:p>0</text:p>
          </table:table-cell>
          <table:table-cell office:value-type="float" office:value="0" table:formula="of:=SUMIF([Salidas.B:.B]; [.B89]; [Salidas.C:.C])" table:style-name="ce1">
            <text:p>0</text:p>
          </table:table-cell>
          <table:table-cell office:value-type="float" office:value="18" table:formula="of:=[.C89]+[.D89]-[.E89]" table:style-name="ce1">
            <text:p>18</text:p>
          </table:table-cell>
          <table:table-cell office:value-type="string" office:string-value="STOCK OK" table:formula="of:=IF([Inventario.$F89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Sin Fin Pivot LINDSAY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SUMIF([Entradas.B:.B]; [.B90]; [Entradas.C:.C])" table:style-name="ce1">
            <text:p>0</text:p>
          </table:table-cell>
          <table:table-cell office:value-type="float" office:value="0" table:formula="of:=SUMIF([Salidas.B:.B]; [.B90]; [Salidas.C:.C])" table:style-name="ce1">
            <text:p>0</text:p>
          </table:table-cell>
          <table:table-cell office:value-type="float" office:value="7" table:formula="of:=[.C90]+[.D90]-[.E90]" table:style-name="ce1">
            <text:p>7</text:p>
          </table:table-cell>
          <table:table-cell office:value-type="string" office:string-value=" PEDIR URGENTE" table:formula="of:=IF([Inventario.$F90]&lt;8;&quot; PEDIR URGENTE&quot;;&quot;STOCK OK&quot;)" table:style-name="ce9">
            <text:p><text:s/>PEDIR URGEN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orona Para Caja Reductora VALLEY</text:p>
          </table:table-cell>
          <table:table-cell office:value-type="float" office:value="35" table:style-name="ce1">
            <text:p>35</text:p>
          </table:table-cell>
          <table:table-cell office:value-type="float" office:value="0" table:formula="of:=SUMIF([Entradas.B:.B]; [.B91]; [Entradas.C:.C])" table:style-name="ce1">
            <text:p>0</text:p>
          </table:table-cell>
          <table:table-cell office:value-type="float" office:value="0" table:formula="of:=SUMIF([Salidas.B:.B]; [.B91]; [Salidas.C:.C])" table:style-name="ce1">
            <text:p>0</text:p>
          </table:table-cell>
          <table:table-cell office:value-type="float" office:value="35" table:formula="of:=[.C91]+[.D91]-[.E91]" table:style-name="ce1">
            <text:p>35</text:p>
          </table:table-cell>
          <table:table-cell office:value-type="string" office:string-value="STOCK OK" table:formula="of:=IF([Inventario.$F91]&lt;8;&quot; PEDIR URGENTE&quot;;&quot;STOCK OK&quot;)" table:style-name="ce9">
            <text:p>STOCK 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ego</text:p>
          </table:table-cell>
          <table:table-cell office:value-type="string" table:style-name="ce4">
            <text:p>Corona Para Caja Reductora VALLEY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IF([Entradas.B:.B]; [.B92]; [Entradas.C:.C])" table:style-name="ce1">
            <text:p>0</text:p>
          </table:table-cell>
          <table:table-cell office:value-type="float" office:value="0" table:formula="of:=SUMIF([Salidas.B:.B]; [.B92]; [Salidas.C:.C])" table:style-name="ce1">
            <text:p>0</text:p>
          </table:table-cell>
          <table:table-cell office:value-type="float" office:value="22" table:formula="of:=[.C92]+[.D92]-[.E92]" table:style-name="ce1">
            <text:p>22</text:p>
          </table:table-cell>
          <table:table-cell office:value-type="string" office:string-value="STOCK OK" table:formula="of:=IF([Inventario.$F92]&lt;8;&quot; PEDIR URGENTE&quot;;&quot;STOCK OK&quot;)" table:style-name="ce9">
            <text:p>STOCK OK</text:p>
          </table:table-cell>
          <table:table-cell table:number-columns-repeated="16377"/>
        </table:table-row>
        <table:table-row table:number-rows-repeated="420" table:style-name="ro2">
          <table:table-cell table:number-columns-repeated="6"/>
          <table:table-cell table:style-name="ce8"/>
          <table:table-cell table:number-columns-repeated="16377"/>
        </table:table-row>
        <table:table-row table:number-rows-repeated="1048064" table:style-name="ro2">
          <table:table-cell table:number-columns-repeated="16384"/>
        </table:table-row>
      </table:table>
      <table:table table:name="Entrada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8" table:number-columns-repeated="16379" table:default-cell-style-name="ce1"/>
        <table:table-row table:style-name="ro2">
          <table:table-cell office:value-type="string" table:style-name="ce1">
            <text:p>Fecha</text:p>
          </table:table-cell>
          <table:table-cell office:value-type="string" table:style-name="ce1">
            <text:p>Producto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Proveedor</text:p>
          </table:table-cell>
          <table:table-cell table:number-columns-repeated="16380" table:style-name="ce1"/>
        </table:table-row>
        <table:table-row table:number-rows-repeated="6" table:style-name="ro2">
          <table:table-cell table:style-name="ce6"/>
          <table:table-cell table:number-columns-repeated="3" table:style-name="ce4"/>
          <table:table-cell table:number-columns-repeated="16380" table:style-name="ce1"/>
        </table:table-row>
        <table:table-row table:style-name="ro2">
          <table:table-cell table:style-name="ce6"/>
          <table:table-cell table:number-columns-repeated="3" table:style-name="ce4"/>
          <table:table-cell office:value-type="string" table:style-name="ce1">
            <text:p><text:s/></text:p>
          </table:table-cell>
          <table:table-cell table:number-columns-repeated="16379"/>
        </table:table-row>
        <table:table-row table:number-rows-repeated="8" table:style-name="ro2">
          <table:table-cell table:style-name="ce6"/>
          <table:table-cell table:number-columns-repeated="3" table:style-name="ce4"/>
          <table:table-cell table:number-columns-repeated="16380" table:style-name="ce1"/>
        </table:table-row>
        <table:table-row table:number-rows-repeated="76" table:style-name="ro2">
          <table:table-cell table:style-name="ce6"/>
          <table:table-cell table:number-columns-repeated="3" table:style-name="ce4"/>
          <table:table-cell table:number-columns-repeated="16380"/>
        </table:table-row>
        <table:table-row table:number-rows-repeated="1048484" table:style-name="ro2">
          <table:table-cell table:number-columns-repeated="16384"/>
        </table:table-row>
      </table:table>
      <table:table table:name="Salidas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80" table:default-cell-style-name="ce1"/>
        <table:table-row table:style-name="ro2">
          <table:table-cell office:value-type="string" table:style-name="ce1">
            <text:p>Fecha</text:p>
          </table:table-cell>
          <table:table-cell office:value-type="string" table:style-name="ce1">
            <text:p>Descripcion/Modelo</text:p>
          </table:table-cell>
          <table:table-cell office:value-type="string" table:style-name="ce1">
            <text:p>Cantiad</text:p>
          </table:table-cell>
          <table:table-cell office:value-type="string" table:style-name="ce1">
            <text:p>Destino/Equipo</text:p>
          </table:table-cell>
          <table:table-cell table:number-columns-repeated="16380"/>
        </table:table-row>
        <table:table-row table:style-name="ro2">
          <table:table-cell office:value-type="date" office:date-value="2026-02-12T00:00:00" table:style-name="ce6">
            <text:p>12/2/2026</text:p>
          </table:table-cell>
          <table:table-cell office:value-type="string" table:style-name="ce4">
            <text:p>Contactor de Torre <text:s/>D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vot 4</text:p>
          </table:table-cell>
          <table:table-cell table:number-columns-repeated="16380"/>
        </table:table-row>
        <table:table-row table:style-name="ro2">
          <table:table-cell office:value-type="date" office:date-value="2026-02-12T00:00:00" table:style-name="ce6">
            <text:p>12/2/2026</text:p>
          </table:table-cell>
          <table:table-cell office:value-type="string" table:style-name="ce1">
            <text:p>Micro Lindsay (pata larga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paración General</text:p>
          </table:table-cell>
          <table:table-cell table:number-columns-repeated="16380"/>
        </table:table-row>
        <table:table-row table:style-name="ro2">
          <table:table-cell office:value-type="date" office:date-value="2026-02-19T00:00:00" table:style-name="ce6">
            <text:p>19/2/2026</text:p>
          </table:table-cell>
          <table:table-cell office:value-type="string" table:style-name="ce4">
            <text:p>Caja Box Linds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quipo A0</text:p>
          </table:table-cell>
          <table:table-cell table:number-columns-repeated="16380"/>
        </table:table-row>
        <table:table-row table:style-name="ro2">
          <table:table-cell office:value-type="date" office:date-value="2026-02-19T00:00:00" table:style-name="ce6">
            <text:p>19/2/2026</text:p>
          </table:table-cell>
          <table:table-cell office:value-type="string" table:style-name="ce4">
            <text:p>Térmica Uni-polar C32 400 vol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quipo A0</text:p>
          </table:table-cell>
          <table:table-cell table:number-columns-repeated="16380"/>
        </table:table-row>
        <table:table-row table:style-name="ro2">
          <table:table-cell office:value-type="date" office:date-value="2026-02-20T00:00:00" table:style-name="ce6">
            <text:p>20/2/2026</text:p>
          </table:table-cell>
          <table:table-cell office:value-type="string" table:style-name="ce1">
            <text:p>Pack de cruseta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quipos B4-A4</text:p>
          </table:table-cell>
          <table:table-cell table:number-columns-repeated="16380"/>
        </table:table-row>
        <table:table-row table:style-name="ro2">
          <table:table-cell office:value-type="date" office:date-value="2026-02-20T00:00:00" table:style-name="ce6">
            <text:p>20/2/2026</text:p>
          </table:table-cell>
          <table:table-cell office:value-type="string" table:style-name="ce1">
            <text:p>Caja Reductora Linds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quipo B4</text:p>
          </table:table-cell>
          <table:table-cell table:number-columns-repeated="16380"/>
        </table:table-row>
        <table:table-row table:style-name="ro2">
          <table:table-cell office:value-type="date" office:date-value="2026-02-24T00:00:00" table:style-name="ce6">
            <text:p>24/2/2026</text:p>
          </table:table-cell>
          <table:table-cell office:value-type="string" table:style-name="ce1">
            <text:p>Pack de cruseta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quipo A1</text:p>
          </table:table-cell>
          <table:table-cell table:number-columns-repeated="16380"/>
        </table:table-row>
        <table:table-row table:style-name="ro2">
          <table:table-cell office:value-type="date" office:date-value="2026-02-24T00:00:00" table:style-name="ce6">
            <text:p>24/2/2026</text:p>
          </table:table-cell>
          <table:table-cell office:value-type="string" table:style-name="ce4">
            <text:p>Contactor de Panel <text:s/>FLA 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quipo A0</text:p>
          </table:table-cell>
          <table:table-cell table:number-columns-repeated="16380"/>
        </table:table-row>
        <table:table-row table:style-name="ro2">
          <table:table-cell office:value-type="date" office:date-value="2026-02-26T00:00:00" table:style-name="ce6">
            <text:p>26/2/2026</text:p>
          </table:table-cell>
          <table:table-cell office:value-type="string" table:style-name="ce1">
            <text:p>Disco de corte chic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ller 21</text:p>
          </table:table-cell>
          <table:table-cell table:number-columns-repeated="16380"/>
        </table:table-row>
        <table:table-row table:style-name="ro2">
          <table:table-cell office:value-type="date" office:date-value="2026-02-26T00:00:00" table:style-name="ce6">
            <text:p>26/2/2026</text:p>
          </table:table-cell>
          <table:table-cell office:value-type="string" table:style-name="ce1">
            <text:p>Electrodo Punta Azul 3,25</text:p>
          </table:table-cell>
          <table:table-cell office:value-type="string" table:style-name="ce7">
            <text:p>0,5 kg</text:p>
          </table:table-cell>
          <table:table-cell office:value-type="string" table:style-name="ce1">
            <text:p>Taller 21</text:p>
          </table:table-cell>
          <table:table-cell table:number-columns-repeated="16380"/>
        </table:table-row>
        <table:table-row table:style-name="ro2">
          <table:table-cell office:value-type="date" office:date-value="2026-02-26T00:00:00" table:style-name="ce6">
            <text:p>26/2/2026</text:p>
          </table:table-cell>
          <table:table-cell office:value-type="string" table:style-name="ce1">
            <text:p>Caño Galbanizado 8" x 6,71 mt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quipo B4</text:p>
          </table:table-cell>
          <table:table-cell table:number-columns-repeated="16380"/>
        </table:table-row>
        <table:table-row table:style-name="ro2">
          <table:table-cell office:value-type="date" office:date-value="2026-02-26T00:00:00" table:style-name="ce6">
            <text:p>26/2/2026</text:p>
          </table:table-cell>
          <table:table-cell office:value-type="string" table:style-name="ce4">
            <text:p>Cuello de Cisne Plástic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quipo B4</text:p>
          </table:table-cell>
          <table:table-cell table:number-columns-repeated="16380"/>
        </table:table-row>
        <table:table-row table:style-name="ro2">
          <table:table-cell office:value-type="date" office:date-value="2026-02-26T00:00:00" table:style-name="ce6">
            <text:p>26/2/2026</text:p>
          </table:table-cell>
          <table:table-cell office:value-type="string" table:style-name="ce4">
            <text:p>Junta Para Brida 8”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quipo B4</text:p>
          </table:table-cell>
          <table:table-cell table:number-columns-repeated="16380"/>
        </table:table-row>
        <table:table-row table:style-name="ro2">
          <table:table-cell office:value-type="date" office:date-value="2026-02-26T00:00:00" table:style-name="ce6">
            <text:p>26/2/2026</text:p>
          </table:table-cell>
          <table:table-cell office:value-type="string" table:style-name="ce1">
            <text:p>Abrazadera cremallera 3/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quipo B4</text:p>
          </table:table-cell>
          <table:table-cell table:number-columns-repeated="16380"/>
        </table:table-row>
        <table:table-row table:style-name="ro2">
          <table:table-cell office:value-type="date" office:date-value="2026-02-26T00:00:00" table:style-name="ce6">
            <text:p>26/2/2026</text:p>
          </table:table-cell>
          <table:table-cell office:value-type="string" table:style-name="ce1">
            <text:p>Manguera Negra de Bajada 3/4</text:p>
          </table:table-cell>
          <table:table-cell office:value-type="string" table:style-name="ce1">
            <text:p>10 mts</text:p>
          </table:table-cell>
          <table:table-cell office:value-type="string" table:style-name="ce1">
            <text:p>Equipo A0</text:p>
          </table:table-cell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  <table:database-ranges>
        <table:database-range table:target-range-address="Inventario.A1:Inventario.AMI1048575" table:name="__Anonymous_Sheet_DB__0" table:contains-header="false">
          <table:sort>
            <table:sort-by table:field-number="6"/>
          </table:sort>
        </table:database-range>
        <table:database-range table:target-range-address="Entradas.A1:Entradas.D92" table:name="Tabla4" table:display-filter-buttons="true"/>
        <table:database-range table:target-range-address="Salidas.A1:Salidas.D16" table:name="Tabla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00000"/>
      <style:text-properties fo:color="#C00000"/>
    </style:style>
    <style:style style:name="cf2" style:family="table-cell" style:data-style-name="N0">
      <style:text-properties fo:color="#C00000"/>
    </style:style>
    <style:style style:name="cf3" style:family="table-cell" style:data-style-name="N0">
      <style:table-cell-properties fo:background-color="#FFFFFF"/>
      <style:text-properties fo:color="#FF0000"/>
    </style:style>
    <style:style style:name="cf4" style:family="table-cell" style:data-style-name="N0">
      <style:table-cell-properties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30026</meta:generator>
    <meta:initial-creator>MateoC</meta:initial-creator>
    <dc:creator>Marcelo Carabajal</dc:creator>
    <meta:creation-date>2026-02-12T09:49:31Z</meta:creation-date>
    <dc:date>2026-06-06T00:19:08Z</dc:date>
    <meta:editing-cycles>7</meta:editing-cycles>
    <meta:editing-duration>PT2400S</meta:editing-duration>
  </office:meta>
</office:document-meta>
</file>